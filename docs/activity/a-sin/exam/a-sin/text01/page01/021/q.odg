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9cm">
          <draw:text-box>
            <text:p><text:span text:style-name="T1">t</text:span></text:p>
          </draw:text-box>
        </draw:frame>
        <draw:frame draw:style-name="gr2" draw:text-style-name="P2" draw:layer="layout" svg:width="15.078cm" svg:height="8.481cm" svg:x="0.3cm" svg:y="1.01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6-06-02T09:45:31.784472901</dc:date>
    <meta:editing-duration>PT5M44S</meta:editing-duration>
    <meta:editing-cycles>26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79cm" svg:height="8.482cm" xlink:href="." xlink:type="simple" chart:class="chart:scatter" chart:style-name="ch1">
        <chart:plot-area chart:style-name="ch2" chart:data-source-has-labels="both" svg:x="0.301cm" svg:y="0.169cm" svg:width="14.477cm" svg:height="8.144cm">
          <chart:coordinate-region svg:x="0.843cm" svg:y="0.368cm" svg:width="13.841cm" svg:height="7.746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836973318117687">
                <text:p>0.8369733181176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654429724189627">
                <text:p>0.6544297241896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562143943757175">
                <text:p>0.562143943757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469303395120693">
                <text:p>0.4693033951206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282324939955543">
                <text:p>0.2823249399555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0942322772343845">
                <text:p>0.09423227723438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0942322772343842">
                <text:p>-0.09423227723438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282324939955543">
                <text:p>-0.2823249399555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469303395120692">
                <text:p>-0.4693033951206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654429724189626">
                <text:p>-0.6544297241896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836973318117687">
                <text:p>-0.8369733181176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1.01621376073588">
                <text:p>-1.016213760735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0.836973318117689">
                <text:p>-0.8369733181176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0.65442972418963">
                <text:p>-0.654429724189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0.469303395120693">
                <text:p>-0.4693033951206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0.375999700692914">
                <text:p>-0.3759997006929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0.282324939955545">
                <text:p>-0.2823249399555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0.0942322772343849">
                <text:p>-0.09423227723438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5.51091059616309E-016">
                <text:p>-5.51091059616309E-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.0942322772343838">
                <text:p>0.09423227723438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.188371558587939">
                <text:p>0.1883715585879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0.282324939955544">
                <text:p>0.2823249399555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.469303395120692">
                <text:p>0.4693033951206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.562143943757173">
                <text:p>0.5621439437571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.654429724189629">
                <text:p>0.6544297241896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.746069661494565">
                <text:p>0.7460696614945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0.836973318117688">
                <text:p>0.8369733181176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1.44526102230514">
                <text:p>1.445261022305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2.12132034355964">
                <text:p>2.12132034355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