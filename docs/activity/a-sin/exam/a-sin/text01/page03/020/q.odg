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4.7cm" svg:y="4.75cm">
          <draw:text-box>
            <text:p><text:span text:style-name="T1">t</text:span></text:p>
          </draw:text-box>
        </draw:frame>
        <draw:frame draw:style-name="gr2" draw:text-style-name="P2" draw:layer="layout" svg:width="14.078cm" svg:height="7.918cm" svg:x="0.5cm" svg:y="1.1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6-02T09:56:30.244028839</dc:date>
    <meta:editing-duration>PT2M39S</meta:editing-duration>
    <meta:editing-cycles>16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79cm" svg:height="7.919cm" xlink:href="." xlink:type="simple" chart:class="chart:scatter" chart:style-name="ch1">
        <chart:plot-area chart:style-name="ch2" chart:data-source-has-labels="both" svg:x="0.281cm" svg:y="0.158cm" svg:width="13.517cm" svg:height="7.603cm">
          <chart:coordinate-region svg:x="0.823cm" svg:y="0.357cm" svg:width="12.881cm" svg:height="7.205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628215181562567">
                <text:p>-0.0628215181562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628215181562567">
                <text:p>0.0628215181562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851558583130144">
                <text:p>0.851558583130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677475840490584">
                <text:p>0.6774758404905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18821662663703">
                <text:p>0.188216626637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628215181562565">
                <text:p>0.06282151815625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062821518156256">
                <text:p>-0.062821518156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436286482793086">
                <text:p>-0.436286482793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677475840490584">
                <text:p>-0.6774758404905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79429578126956">
                <text:p>-0.79429578126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