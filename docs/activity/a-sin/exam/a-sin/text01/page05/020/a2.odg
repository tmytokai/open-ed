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  <style:font-face style:name="呡歡潐䝯瑨楣" svg:font-family="呡歡潐䝯瑨楣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4.978cm" svg:height="8.425cm" svg:x="0.022cm" svg:y="1.09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  <style:font-face style:name="呡歡潐䝯瑨楣" svg:font-family="呡歡潐䝯瑨楣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黃_ff09_" draw:display-name="塗りつぶし（黃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6-06-02T10:15:51.354477430</dc:date>
    <meta:editing-duration>PT3M51S</meta:editing-duration>
    <meta:editing-cycles>21</meta:editing-cycles>
    <meta:generator>LibreOffice/24.2.7.2$Linux_X86_64 LibreOffice_project/420$Build-2</meta:generator>
    <meta:document-statistic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4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979cm" svg:height="8.426cm" xlink:href="." xlink:type="simple" chart:class="chart:scatter" chart:style-name="ch1">
        <chart:plot-area chart:style-name="ch2" chart:data-source-has-labels="both" svg:x="0.299cm" svg:y="0.168cm" svg:width="14.381cm" svg:height="8.09cm">
          <chart:coordinate-region svg:x="0.841cm" svg:y="0.367cm" svg:width="13.745cm" svg:height="7.692cm"/>
          <chart:axis chart:dimension="x" chart:name="primary-x" chart:style-name="ch3" chartooo:axis-type="auto">
            <chart:categories table:cell-range-address="local-table.$A$2:.$A$2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2.15437889328957">
                <text:p>2.154378893289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2.21889328493583">
                <text:p>2.218893284935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2.25033320889138">
                <text:p>2.250333208891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2.28121789680009">
                <text:p>2.281217896800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2.34129122201499">
                <text:p>2.341291222014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2.37046503712707">
                <text:p>2.370465037127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2.39905397546127">
                <text:p>2.399053975461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2.45444915227507">
                <text:p>2.454449152275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2.48124172282369">
                <text:p>2.481241722823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2.50742208410481">
                <text:p>2.507422084104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2.53298377650605">
                <text:p>2.532983776506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2.55792049306228">
                <text:p>2.557920493062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2.58222608101183">
                <text:p>2.582226081011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2.60589454331457">
                <text:p>2.605894543314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2.65129689026608">
                <text:p>2.651296890266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2.6730195725651">
                <text:p>2.67301957256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2.69408272728185">
                <text:p>2.694082727281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2.73420982990634">
                <text:p>2.734209829906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2.75326387705194">
                <text:p>2.753263877051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2.77163859753386">
                <text:p>2.771638597533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2.78932945766475">
                <text:p>2.789329457664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2.8063320924896">
                <text:p>2.80633209248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2.82264230686268">
                <text:p>2.822642306862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2.83825607648264">
                <text:p>2.838256076482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2.86737904439499">
                <text:p>2.867379044394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2.88088105703083">
                <text:p>2.880881057030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2.89367225537339">
                <text:p>2.893672255373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2.91710976119303">
                <text:p>2.917109761193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2.92775028581624">
                <text:p>2.927750285816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2.9376684318653">
                <text:p>2.93766843186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2.95532797846432">
                <text:p>2.955327978464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2.96306502178541">
                <text:p>2.963065021785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2.97007097314967">
                <text:p>2.970070973149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2.97634410394343">
                <text:p>2.976344103943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2.98188286636554">
                <text:p>2.981882866365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2.98668589380924">
                <text:p>2.986685893809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2.99075200119938">
                <text:p>2.990752001199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2.99666962488591">
                <text:p>2.996669624885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2.99851968109719">
                <text:p>2.998519681097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2.99962989744498">
                <text:p>2.999629897444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2.99962989744498">
                <text:p>2.999629897444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2.99851968109719">
                <text:p>2.998519681097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2.99666962488591">
                <text:p>2.996669624885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2.99075200119938">
                <text:p>2.990752001199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2.98668589380924">
                <text:p>2.986685893809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2.98188286636554">
                <text:p>2.9818828663655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2.97634410394343">
                <text:p>2.976344103943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2.97007097314967">
                <text:p>2.970070973149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2.96306502178541">
                <text:p>2.963065021785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2.95532797846432">
                <text:p>2.955327978464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2.9376684318653">
                <text:p>2.93766843186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2.92775028581624">
                <text:p>2.927750285816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2.91710976119303">
                <text:p>2.917109761193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2.89367225537339">
                <text:p>2.893672255373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2.88088105703083">
                <text:p>2.880881057030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2.86737904439499">
                <text:p>2.867379044394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2.83825607648264">
                <text:p>2.8382560764826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2.82264230686268">
                <text:p>2.8226423068626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2.8063320924896">
                <text:p>2.80633209248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2.78932945766475">
                <text:p>2.789329457664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2.77163859753386">
                <text:p>2.7716385975338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2.75326387705194">
                <text:p>2.753263877051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2.73420982990634">
                <text:p>2.734209829906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2.69408272728185">
                <text:p>2.694082727281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2.6730195725651">
                <text:p>2.67301957256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2.65129689026608">
                <text:p>2.651296890266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2.60589454331457">
                <text:p>2.605894543314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2.58222608101183">
                <text:p>2.5822260810118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2.55792049306228">
                <text:p>2.557920493062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2.53298377650605">
                <text:p>2.532983776506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2.50742208410481">
                <text:p>2.507422084104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2.48124172282369">
                <text:p>2.481241722823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2.45444915227507">
                <text:p>2.454449152275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2.39905397546127">
                <text:p>2.399053975461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2.37046503712707">
                <text:p>2.3704650371270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2.34129122201499">
                <text:p>2.341291222014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2.28121789680009">
                <text:p>2.281217896800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2.25033320889138">
                <text:p>2.250333208891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2.21889328493583">
                <text:p>2.2188932849358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2.15437889328957">
                <text:p>2.1543788932895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2.08773838977694">
                <text:p>2.0877383897769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2.01903754052932">
                <text:p>2.019037540529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1.98393559597096">
                <text:p>1.9839355959709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1.94834414499055">
                <text:p>1.948344144990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1.91227196924607">
                <text:p>1.9122719692460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1.87572796900712">
                <text:p>1.875727969007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1.83872116095893">
                <text:p>1.8387211609589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1.80126067597765">
                <text:p>1.8012606759776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1.72501575612984">
                <text:p>1.7250157561298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1.68625013355639">
                <text:p>1.6862501335563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1.6470684539944">
                <text:p>1.647068453994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1.56749569414785">
                <text:p>1.5674956941478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1.52712424725111">
                <text:p>1.5271242472511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1.48637600529722">
                <text:p>1.486376005297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1.44526102230515">
                <text:p>1.445261022305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1.40378944278172">
                <text:p>1.4037894427817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1.36197149921864">
                <text:p>1.361971499218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1.31981750956775">
                <text:p>1.319817509567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1.27733787469522">
                <text:p>1.2773378746952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1.23454307581533">
                <text:p>1.234543075815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1.19144367190434">
                <text:p>1.191443671904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1.14805029709527">
                <text:p>1.1480502970952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1.10437365805403">
                <text:p>1.1043736580540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1.06042453133777">
                <text:p>1.0604245313377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1.01621376073587">
                <text:p>1.0162137607358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0.971752254594448">
                <text:p>0.9717522545944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0.927050983124842">
                <text:p>0.9270509831248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0.882120975696912">
                <text:p>0.88212097569691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0.836973318117687">
                <text:p>0.83697331811768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0.791619149896118">
                <text:p>0.79161914989611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0.746069661494564">
                <text:p>0.74606966149456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0.700336091567716">
                <text:p>0.70033609156771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0.654429724189627">
                <text:p>0.65442972418962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0.608361886069537">
                <text:p>0.60836188606953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0.562143943757175">
                <text:p>0.5621439437571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0.51578730083823">
                <text:p>0.5157873008382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0.469303395120693">
                <text:p>0.46930339512069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0.422703695812748">
                <text:p>0.42270369581274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0.375999700692913">
                <text:p>0.3759997006929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0.329202933273137">
                <text:p>0.32920293327313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0.282324939955543">
                <text:p>0.28232493995554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0.235377287183535">
                <text:p>0.23537728718353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0.188371558587941">
                <text:p>0.18837155858794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0.141319352128929">
                <text:p>0.14131935212892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0.0942322772343845">
                <text:p>0.094232277234384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0.0471219519354619">
                <text:p>0.047121951935461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1.83697019872103E-016">
                <text:p>1.83697019872103E-01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02">
                <text:p>3.02</text:p>
              </table:table-cell>
              <table:table-cell office:value-type="float" office:value="-0.0471219519354616">
                <text:p>-0.047121951935461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04">
                <text:p>3.04</text:p>
              </table:table-cell>
              <table:table-cell office:value-type="float" office:value="-0.0942322772343842">
                <text:p>-0.094232277234384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06">
                <text:p>3.06</text:p>
              </table:table-cell>
              <table:table-cell office:value-type="float" office:value="-0.141319352128928">
                <text:p>-0.14131935212892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08">
                <text:p>3.08</text:p>
              </table:table-cell>
              <table:table-cell office:value-type="float" office:value="-0.18837155858794">
                <text:p>-0.1883715585879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1">
                <text:p>3.1</text:p>
              </table:table-cell>
              <table:table-cell office:value-type="float" office:value="-0.235377287183535">
                <text:p>-0.23537728718353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12">
                <text:p>3.12</text:p>
              </table:table-cell>
              <table:table-cell office:value-type="float" office:value="-0.282324939955543">
                <text:p>-0.28232493995554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14">
                <text:p>3.14</text:p>
              </table:table-cell>
              <table:table-cell office:value-type="float" office:value="-0.329202933273136">
                <text:p>-0.32920293327313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16">
                <text:p>3.16</text:p>
              </table:table-cell>
              <table:table-cell office:value-type="float" office:value="-0.375999700692913">
                <text:p>-0.37599970069291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18">
                <text:p>3.18</text:p>
              </table:table-cell>
              <table:table-cell office:value-type="float" office:value="-0.422703695812748">
                <text:p>-0.42270369581274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2">
                <text:p>3.2</text:p>
              </table:table-cell>
              <table:table-cell office:value-type="float" office:value="-0.469303395120692">
                <text:p>-0.46930339512069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22">
                <text:p>3.22</text:p>
              </table:table-cell>
              <table:table-cell office:value-type="float" office:value="-0.515787300838229">
                <text:p>-0.51578730083822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24">
                <text:p>3.24</text:p>
              </table:table-cell>
              <table:table-cell office:value-type="float" office:value="-0.562143943757175">
                <text:p>-0.56214394375717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26">
                <text:p>3.26</text:p>
              </table:table-cell>
              <table:table-cell office:value-type="float" office:value="-0.608361886069537">
                <text:p>-0.60836188606953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28">
                <text:p>3.28</text:p>
              </table:table-cell>
              <table:table-cell office:value-type="float" office:value="-0.654429724189626">
                <text:p>-0.65442972418962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3">
                <text:p>3.3</text:p>
              </table:table-cell>
              <table:table-cell office:value-type="float" office:value="-0.700336091567716">
                <text:p>-0.70033609156771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32">
                <text:p>3.32</text:p>
              </table:table-cell>
              <table:table-cell office:value-type="float" office:value="-0.746069661494564">
                <text:p>-0.7460696614945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34">
                <text:p>3.34</text:p>
              </table:table-cell>
              <table:table-cell office:value-type="float" office:value="-0.791619149896118">
                <text:p>-0.79161914989611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36">
                <text:p>3.36</text:p>
              </table:table-cell>
              <table:table-cell office:value-type="float" office:value="-0.836973318117687">
                <text:p>-0.83697331811768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38">
                <text:p>3.38</text:p>
              </table:table-cell>
              <table:table-cell office:value-type="float" office:value="-0.882120975696912">
                <text:p>-0.88212097569691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4">
                <text:p>3.4</text:p>
              </table:table-cell>
              <table:table-cell office:value-type="float" office:value="-0.927050983124842">
                <text:p>-0.92705098312484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42">
                <text:p>3.42</text:p>
              </table:table-cell>
              <table:table-cell office:value-type="float" office:value="-0.971752254594448">
                <text:p>-0.97175225459444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44">
                <text:p>3.44</text:p>
              </table:table-cell>
              <table:table-cell office:value-type="float" office:value="-1.01621376073587">
                <text:p>-1.0162137607358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46">
                <text:p>3.46</text:p>
              </table:table-cell>
              <table:table-cell office:value-type="float" office:value="-1.06042453133777">
                <text:p>-1.0604245313377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48">
                <text:p>3.48</text:p>
              </table:table-cell>
              <table:table-cell office:value-type="float" office:value="-1.10437365805403">
                <text:p>-1.1043736580540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5">
                <text:p>3.5</text:p>
              </table:table-cell>
              <table:table-cell office:value-type="float" office:value="-1.14805029709527">
                <text:p>-1.1480502970952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52">
                <text:p>3.52</text:p>
              </table:table-cell>
              <table:table-cell office:value-type="float" office:value="-1.19144367190434">
                <text:p>-1.1914436719043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54">
                <text:p>3.54</text:p>
              </table:table-cell>
              <table:table-cell office:value-type="float" office:value="-1.23454307581533">
                <text:p>-1.234543075815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56">
                <text:p>3.56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58">
                <text:p>3.58</text:p>
              </table:table-cell>
              <table:table-cell office:value-type="float" office:value="-1.31981750956775">
                <text:p>-1.3198175095677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6">
                <text:p>3.6</text:p>
              </table:table-cell>
              <table:table-cell office:value-type="float" office:value="-1.36197149921864">
                <text:p>-1.3619714992186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62">
                <text:p>3.62</text:p>
              </table:table-cell>
              <table:table-cell office:value-type="float" office:value="-1.40378944278172">
                <text:p>-1.4037894427817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64">
                <text:p>3.64</text:p>
              </table:table-cell>
              <table:table-cell office:value-type="float" office:value="-1.44526102230515">
                <text:p>-1.4452610223051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66">
                <text:p>3.66</text:p>
              </table:table-cell>
              <table:table-cell office:value-type="float" office:value="-1.48637600529722">
                <text:p>-1.4863760052972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68">
                <text:p>3.68</text:p>
              </table:table-cell>
              <table:table-cell office:value-type="float" office:value="-1.52712424725111">
                <text:p>-1.5271242472511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7">
                <text:p>3.7</text:p>
              </table:table-cell>
              <table:table-cell office:value-type="float" office:value="-1.56749569414785">
                <text:p>-1.5674956941478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72">
                <text:p>3.72</text:p>
              </table:table-cell>
              <table:table-cell office:value-type="float" office:value="-1.60748038493699">
                <text:p>-1.6074803849369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74">
                <text:p>3.74</text:p>
              </table:table-cell>
              <table:table-cell office:value-type="float" office:value="-1.6470684539944">
                <text:p>-1.647068453994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76">
                <text:p>3.76</text:p>
              </table:table-cell>
              <table:table-cell office:value-type="float" office:value="-1.68625013355639">
                <text:p>-1.6862501335563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78">
                <text:p>3.78</text:p>
              </table:table-cell>
              <table:table-cell office:value-type="float" office:value="-1.72501575612983">
                <text:p>-1.7250157561298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8">
                <text:p>3.8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82">
                <text:p>3.82</text:p>
              </table:table-cell>
              <table:table-cell office:value-type="float" office:value="-1.80126067597765">
                <text:p>-1.8012606759776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84">
                <text:p>3.84</text:p>
              </table:table-cell>
              <table:table-cell office:value-type="float" office:value="-1.83872116095893">
                <text:p>-1.8387211609589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86">
                <text:p>3.86</text:p>
              </table:table-cell>
              <table:table-cell office:value-type="float" office:value="-1.87572796900711">
                <text:p>-1.8757279690071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88">
                <text:p>3.88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9">
                <text:p>3.9</text:p>
              </table:table-cell>
              <table:table-cell office:value-type="float" office:value="-1.94834414499055">
                <text:p>-1.9483441449905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92">
                <text:p>3.92</text:p>
              </table:table-cell>
              <table:table-cell office:value-type="float" office:value="-1.98393559597096">
                <text:p>-1.9839355959709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94">
                <text:p>3.94</text:p>
              </table:table-cell>
              <table:table-cell office:value-type="float" office:value="-2.01903754052932">
                <text:p>-2.0190375405293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96">
                <text:p>3.96</text:p>
              </table:table-cell>
              <table:table-cell office:value-type="float" office:value="-2.05364131778607">
                <text:p>-2.0536413177860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98">
                <text:p>3.98</text:p>
              </table:table-cell>
              <table:table-cell office:value-type="float" office:value="-2.08773838977694">
                <text:p>-2.0877383897769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">
                <text:p>4</text:p>
              </table:table-cell>
              <table:table-cell office:value-type="float" office:value="-2.12132034355964">
                <text:p>-2.121320343559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7" draw:display-name="Gradient 7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8" draw:display-name="Gradient 8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