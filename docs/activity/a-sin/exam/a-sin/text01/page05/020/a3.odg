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978cm" svg:height="8.425cm" svg:x="0.022cm" svg:y="1.09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黃_ff09_" draw:display-name="塗りつぶし（黃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6-06-02T10:14:57.285410629</dc:date>
    <meta:editing-duration>PT3M30S</meta:editing-duration>
    <meta:editing-cycles>21</meta:editing-cycles>
    <meta:generator>LibreOffice/24.2.7.2$Linux_X86_64 LibreOffice_project/420$Build-2</meta:generator>
    <meta:document-statistic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979cm" svg:height="8.426cm" xlink:href="." xlink:type="simple" chart:class="chart:scatter" chart:style-name="ch1">
        <chart:plot-area chart:style-name="ch2" chart:data-source-has-labels="both" svg:x="0.299cm" svg:y="0.168cm" svg:width="14.381cm" svg:height="8.09cm">
          <chart:coordinate-region svg:x="0.841cm" svg:y="0.367cm" svg:width="13.745cm" svg:height="7.692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83697019872103E-016">
                <text:p>1.83697019872103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0.746069661494564">
                <text:p>-0.7460696614945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.375999700692914">
                <text:p>-0.3759997006929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375999700692913">
                <text:p>0.3759997006929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2.53298377650605">
                <text:p>2.532983776506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746069661494566">
                <text:p>0.7460696614945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9.18485099360515E-016">
                <text:p>9.18485099360515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746069661494564">
                <text:p>-0.7460696614945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2.53298377650604">
                <text:p>-2.532983776506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375999700692912">
                <text:p>-0.3759997006929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375999700692909">
                <text:p>0.3759997006929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2.31153972832736">
                <text:p>2.311539728327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2.99408018528482">
                <text:p>2.994080185284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2.53298377650605">
                <text:p>2.532983776506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746069661494567">
                <text:p>0.7460696614945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.65327317884893E-015">
                <text:p>1.65327317884893E-0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746069661494564">
                <text:p>-0.7460696614945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2.99408018528482">
                <text:p>-2.994080185284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0.375999700692918">
                <text:p>-0.3759997006929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375999700692903">
                <text:p>0.3759997006929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1.10437365805404">
                <text:p>1.104373658054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2.99408018528482">
                <text:p>2.994080185284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2.53298377650605">
                <text:p>2.532983776506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746069661494557">
                <text:p>0.7460696614945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2.94100925986341E-015">
                <text:p>-2.94100925986341E-0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746069661494563">
                <text:p>-0.7460696614945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1.44526102230514">
                <text:p>-1.445261022305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2.05364131778606">
                <text:p>-2.053641317786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2.31153972832738">
                <text:p>-2.311539728327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1.10437365805404">
                <text:p>-1.104373658054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375999700692919">
                <text:p>-0.3759997006929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375999700692903">
                <text:p>0.3759997006929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1.10437365805404">
                <text:p>1.104373658054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2.99408018528482">
                <text:p>2.994080185284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2.53298377650605">
                <text:p>2.532983776506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1.44526102230516">
                <text:p>1.445261022305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746069661494558">
                <text:p>0.7460696614945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2.206221180375E-015">
                <text:p>-2.206221180375E-0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0.746069661494562">
                <text:p>-0.7460696614945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1.44526102230514">
                <text:p>-1.445261022305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2.05364131778606">
                <text:p>-2.053641317786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2.71448115739805">
                <text:p>-2.714481157398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2.31153972832736">
                <text:p>-2.311539728327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1.10437365805404">
                <text:p>-1.104373658054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0.375999700692898">
                <text:p>-0.3759997006928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0.375999700692902">
                <text:p>0.3759997006929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1.10437365805402">
                <text:p>1.104373658054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1.7633557568774">
                <text:p>1.76335575687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2.94686175218606">
                <text:p>2.946861752186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2.99408018528482">
                <text:p>2.994080185284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2.53298377650605">
                <text:p>2.532983776506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1.44526102230516">
                <text:p>1.445261022305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0.746069661494559">
                <text:p>0.74606966149455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1.47143310088659E-015">
                <text:p>-1.47143310088659E-0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0.746069661494562">
                <text:p>-0.7460696614945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1.44526102230514">
                <text:p>-1.445261022305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2.94686175218606">
                <text:p>-2.946861752186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2.71448115739805">
                <text:p>-2.714481157398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2.31153972832736">
                <text:p>-2.311539728327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1.10437365805402">
                <text:p>-1.104373658054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0.375999700692899">
                <text:p>-0.3759997006928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0.375999700692901">
                <text:p>0.3759997006929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1.10437365805402">
                <text:p>1.104373658054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2.94686175218606">
                <text:p>2.946861752186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2.53298377650605">
                <text:p>2.532983776506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1.44526102230514">
                <text:p>1.445261022305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0.746069661494559">
                <text:p>0.7460696614945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7.36645021398177E-016">
                <text:p>-7.36645021398177E-0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-0.746069661494561">
                <text:p>-0.7460696614945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-1.44526102230514">
                <text:p>-1.445261022305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-2.94686175218606">
                <text:p>-2.946861752186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-2.71448115739805">
                <text:p>-2.714481157398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-1.10437365805402">
                <text:p>-1.104373658054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-0.3759997006929">
                <text:p>-0.375999700692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0.3759997006929">
                <text:p>0.375999700692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1.10437365805402">
                <text:p>1.104373658054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2.94686175218606">
                <text:p>2.9468617521860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2.53298377650605">
                <text:p>2.532983776506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1.44526102230514">
                <text:p>1.445261022305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0.74606966149456">
                <text:p>0.746069661494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-1.85694190976507E-018">
                <text:p>-1.85694190976507E-01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-0.74606966149456">
                <text:p>-0.746069661494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-1.44526102230514">
                <text:p>-1.445261022305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-2.94686175218606">
                <text:p>-2.946861752186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-1.10437365805402">
                <text:p>-1.104373658054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-0.3759997006929">
                <text:p>-0.37599970069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0.3759997006929">
                <text:p>0.375999700692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1.10437365805402">
                <text:p>1.104373658054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2.71448115739805">
                <text:p>2.714481157398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2.94686175218606">
                <text:p>2.946861752186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2.53298377650605">
                <text:p>2.532983776506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1.44526102230514">
                <text:p>1.445261022305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0.746069661494561">
                <text:p>0.74606966149456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7.32931137578647E-016">
                <text:p>7.32931137578647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7" draw:display-name="Gradient 7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8" draw:display-name="Gradient 8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