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78cm" svg:height="8.425cm" svg:x="0.022cm" svg:y="1.0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6-02T10:18:28.113207817</dc:date>
    <meta:editing-duration>PT3M46S</meta:editing-duration>
    <meta:editing-cycles>22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79cm" svg:height="8.426cm" xlink:href="." xlink:type="simple" chart:class="chart:scatter" chart:style-name="ch1">
        <chart:plot-area chart:style-name="ch2" chart:data-source-has-labels="both" svg:x="0.299cm" svg:y="0.168cm" svg:width="14.381cm" svg:height="8.09cm">
          <chart:coordinate-region svg:x="0.841cm" svg:y="0.367cm" svg:width="13.745cm" svg:height="7.69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51558583130144">
                <text:p>0.851558583130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736249105369358">
                <text:p>-0.7362491053693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736249105369355">
                <text:p>0.73624910536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851558583130147">
                <text:p>0.851558583130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736249105369354">
                <text:p>-0.736249105369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