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178cm" svg:height="7.975cm" svg:x="0.6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3T16:37:53.058694318</dc:date>
    <meta:editing-duration>PT3M15S</meta:editing-duration>
    <meta:editing-cycles>20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9cm" svg:height="7.976cm" xlink:href="." xlink:type="simple" chart:class="chart:scatter" chart:style-name="ch1">
        <chart:plot-area chart:style-name="ch2" chart:data-source-has-labels="both" svg:x="0.283cm" svg:y="0.159cm" svg:width="13.613cm" svg:height="7.658cm">
          <chart:coordinate-region svg:x="0.825cm" svg:y="0.358cm" svg:width="12.977cm" svg:height="7.2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73624910536936">
                <text:p>0.736249105369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.71450551880629E-015">
                <text:p>1.71450551880629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250666467128605">
                <text:p>-0.250666467128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497379774329705">
                <text:p>-0.497379774329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963507348203434">
                <text:p>-0.963507348203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.95943487863577E-015">
                <text:p>-1.9594348786357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