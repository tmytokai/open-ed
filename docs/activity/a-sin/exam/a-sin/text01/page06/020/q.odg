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78cm" svg:height="8.537cm" svg:x="0.022cm" svg:y="0.9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6-02T10:21:52.936825878</dc:date>
    <meta:editing-duration>PT5M28S</meta:editing-duration>
    <meta:editing-cycles>20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9cm" svg:height="8.538cm" xlink:href="." xlink:type="simple" chart:class="chart:scatter" chart:style-name="ch1">
        <chart:plot-area chart:style-name="ch2" chart:data-source-has-labels="both" svg:x="0.303cm" svg:y="0.17cm" svg:width="14.573cm" svg:height="8.198cm">
          <chart:coordinate-region svg:x="0.845cm" svg:y="0.369cm" svg:width="13.937cm" svg:height="7.8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2.5">
                <text:p>-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