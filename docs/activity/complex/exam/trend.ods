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2.288cm"/>
    </style:style>
    <style:style style:name="co9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9"/>
        <table:table-column table:style-name="co6" table:default-cell-style-name="ce6"/>
        <table:table-column table:style-name="co8" table:default-cell-style-name="ce6"/>
        <table:table-column table:style-name="co7" table:default-cell-style-name="ce9"/>
        <table:table-column table:style-name="co8" table:default-cell-style-name="ce6"/>
        <table:table-column table:style-name="co9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>
            <text:p>2023</text:p>
          </table:table-cell>
          <table:table-cell table:style-name="ce4" office:value-type="string" calcext:value-type="string" table:number-columns-spanned="2" table:number-rows-spanned="1">
            <text:p>2024年度</text:p>
          </table:table-cell>
          <table:covered-table-cell table:style-name="ce11"/>
          <table:table-cell table:style-name="ce14" office:value-type="string" calcext:value-type="string">
            <text:p>2025</text:p>
          </table:table-cell>
          <table:table-cell table:style-name="ce11" office:value-type="string" calcext:value-type="string">
            <text:p>2026</text:p>
          </table:table-cell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1/27</text:p>
          </table:table-cell>
          <table:table-cell table:style-name="ce14" office:value-type="string" calcext:value-type="string">
            <text:p>8/1</text:p>
          </table:table-cell>
          <table:table-cell table:style-name="ce11" office:value-type="string" calcext:value-type="string">
            <text:p>8/1</text:p>
          </table:table-cell>
          <table:table-cell table:style-name="ce11" office:value-type="string" calcext:value-type="string">
            <text:p>11/14</text:p>
          </table:table-cell>
          <table:table-cell table:style-name="ce14" office:value-type="string" calcext:value-type="string">
            <text:p>7/31</text:p>
          </table:table-cell>
          <table:table-cell table:style-name="ce11" office:value-type="string" calcext:value-type="string">
            <text:p>6/30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:.U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:.U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:.U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:.U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:.U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:.U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0:.U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:.U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2:.U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3:.U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4:.U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15:.U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6:.U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7:.U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18:.U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19:.U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20:.U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21:.U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22:.U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23:.U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4:.U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5:.U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6:.U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7:.U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8:.U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9:.U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0:.U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1:.U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formula="of:=SUM([.D32:.U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formula="of:=SUM([.D33:.U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 table:style-name="ce16"/>
          <table:table-cell/>
          <table:table-cell table:formula="of:=SUM([.D34:.U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 table:style-name="ce16"/>
          <table:table-cell/>
          <table:table-cell table:formula="of:=SUM([.D35:.U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  <table:table-cell table:style-name="ce16"/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SUM([.D36:.U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38:.U38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9:.U3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0:.U4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1:.U4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2:.U4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3:.U4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4:.U4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5:.U4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6:.U4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7:.U4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8:.U4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49:.U4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D50:.U5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D51:.U5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D52:.U5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3:.U5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4:.U5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5:.U5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6:.U5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7:.U5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8:.U5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9:.U5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0:.U6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1:.U6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2:.U6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3:.U6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4:.U6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5:.U6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formula="of:=SUM([.D66:.U6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formula="of:=SUM([.D67:.U6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 table:style-name="ce16"/>
          <table:table-cell/>
          <table:table-cell table:formula="of:=SUM([.D68:.U6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 table:style-name="ce16"/>
          <table:table-cell/>
          <table:table-cell table:formula="of:=SUM([.D69:.U6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4"/>
          <table:table-cell table:style-name="ce16"/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SUM([.D70:.U7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4"/>
          <table:table-cell table:style-name="ce16"/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SUM([.D71:.U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3:.U7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4:.U7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5:.U7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6:.U7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7:.U7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78:.U7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9:.U7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80:.U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81:.U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82:.U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83:.U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4:.U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5:.U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6:.U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7:.U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8:.U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9:.U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0:.U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1:.U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2:.U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3:.U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4:.U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5:.U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6:.U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7:.U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8:.U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9:.U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0:.U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1:.U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2:.U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3:.U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formula="of:=SUM([.D104:.U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formula="of:=SUM([.D105:.U10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7:.U10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8:.U10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9:.U10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110:.U1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111:.U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2:.U1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13:.U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14:.U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15:.U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6:.U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7:.U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8:.U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9:.U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20:.U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21:.U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2:.U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3:.U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4:.U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5:.U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6:.U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7:.U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8:.U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9:.U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30:.U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1:.U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2:.U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33:.U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34:.U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35:.U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6:.U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7:.U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formula="of:=SUM([.D138:.U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formula="of:=SUM([.D139:.U1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40])" office:value-type="float" office:value="10" calcext:value-type="float">
            <text:p>10</text:p>
          </table:table-cell>
          <table:table-cell table:formula="of:=SUM([.E4:.E140])" office:value-type="float" office:value="10" calcext:value-type="float">
            <text:p>10</text:p>
          </table:table-cell>
          <table:table-cell table:formula="of:=SUM([.F4:.F140])" office:value-type="float" office:value="10" calcext:value-type="float">
            <text:p>10</text:p>
          </table:table-cell>
          <table:table-cell table:formula="of:=SUM([.G4:.G140])" office:value-type="float" office:value="10" calcext:value-type="float">
            <text:p>10</text:p>
          </table:table-cell>
          <table:table-cell table:formula="of:=SUM([.H4:.H140])" office:value-type="float" office:value="10" calcext:value-type="float">
            <text:p>10</text:p>
          </table:table-cell>
          <table:table-cell table:formula="of:=SUM([.I4:.I140])" office:value-type="float" office:value="10" calcext:value-type="float">
            <text:p>10</text:p>
          </table:table-cell>
          <table:table-cell table:formula="of:=SUM([.J4:.J140])" office:value-type="float" office:value="10" calcext:value-type="float">
            <text:p>10</text:p>
          </table:table-cell>
          <table:table-cell table:formula="of:=SUM([.K4:.K140])" office:value-type="float" office:value="10" calcext:value-type="float">
            <text:p>10</text:p>
          </table:table-cell>
          <table:table-cell table:formula="of:=SUM([.L4:.L140])" office:value-type="float" office:value="10" calcext:value-type="float">
            <text:p>10</text:p>
          </table:table-cell>
          <table:table-cell table:formula="of:=SUM([.M4:.M140])" office:value-type="float" office:value="10" calcext:value-type="float">
            <text:p>10</text:p>
          </table:table-cell>
          <table:table-cell table:formula="of:=SUM([.N4:.N140])" office:value-type="float" office:value="10" calcext:value-type="float">
            <text:p>10</text:p>
          </table:table-cell>
          <table:table-cell table:formula="of:=SUM([.O4:.O140])" office:value-type="float" office:value="10" calcext:value-type="float">
            <text:p>10</text:p>
          </table:table-cell>
          <table:table-cell table:formula="of:=SUM([.P4:.P140])" office:value-type="float" office:value="10" calcext:value-type="float">
            <text:p>10</text:p>
          </table:table-cell>
          <table:table-cell table:formula="of:=SUM([.Q4:.Q140])" office:value-type="float" office:value="10" calcext:value-type="float">
            <text:p>10</text:p>
          </table:table-cell>
          <table:table-cell table:formula="of:=SUM([.R4:.R140])" office:value-type="float" office:value="10" calcext:value-type="float">
            <text:p>10</text:p>
          </table:table-cell>
          <table:table-cell table:formula="of:=SUM([.S4:.S140])" office:value-type="float" office:value="10" calcext:value-type="float">
            <text:p>10</text:p>
          </table:table-cell>
          <table:table-cell table:formula="of:=SUM([.T4:.T140])" office:value-type="float" office:value="10" calcext:value-type="float">
            <text:p>10</text:p>
          </table:table-cell>
          <table:table-cell/>
          <table:table-cell table:formula="of:=SUM([.V4:.V140])"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00/00/00</text:date>, <text:time style:data-style-name="N2" text:time-value="07:53:17.94024369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6T07:57:15.982221784</dc:date>
    <meta:editing-duration>PT7H54M7S</meta:editing-duration>
    <meta:editing-cycles>31</meta:editing-cycles>
    <meta:generator>LibreOffice/24.2.7.2$Linux_X86_64 LibreOffice_project/420$Build-2</meta:generator>
    <meta:document-statistic meta:table-count="1" meta:cell-count="782" meta:object-count="0"/>
  </office:meta>
</office:document-meta>
</file>